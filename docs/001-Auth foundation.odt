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>
      <style:text-properties fo:language="en" fo:country="GB"/>
    </style:style>
    <style:style style:name="P31" style:family="paragraph" style:parent-style-name="Text_20_body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1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3">
      <style:paragraph-properties fo:margin-top="0in" fo:margin-bottom="0in"/>
    </style:style>
    <style:style style:name="P52" style:family="paragraph" style:parent-style-name="Text_20_body" style:list-style-name="L4">
      <style:paragraph-properties fo:margin-top="0in" fo:margin-bottom="0in"/>
    </style:style>
    <style:style style:name="P53" style:family="paragraph" style:parent-style-name="Text_20_body" style:list-style-name="L5">
      <style:paragraph-properties fo:margin-top="0in" fo:margin-bottom="0in"/>
    </style:style>
    <style:style style:name="P54" style:family="paragraph" style:parent-style-name="Text_20_body" style:list-style-name="L6">
      <style:paragraph-properties fo:margin-top="0in" fo:margin-bottom="0in"/>
    </style:style>
    <style:style style:name="P55" style:family="paragraph" style:parent-style-name="Text_20_body" style:list-style-name="L7">
      <style:paragraph-properties fo:margin-top="0in" fo:margin-bottom="0in"/>
    </style:style>
    <style:style style:name="P56" style:family="paragraph" style:parent-style-name="Text_20_body" style:list-style-name="L8">
      <style:paragraph-properties fo:margin-top="0in" fo:margin-bottom="0in"/>
    </style:style>
    <style:style style:name="P57" style:family="paragraph" style:parent-style-name="Text_20_body" style:list-style-name="L9">
      <style:paragraph-properties fo:margin-top="0in" fo:margin-bottom="0in"/>
    </style:style>
    <style:style style:name="P58" style:family="paragraph" style:parent-style-name="Text_20_body" style:list-style-name="L10">
      <style:paragraph-properties fo:margin-top="0in" fo:margin-bottom="0in"/>
    </style:style>
    <style:style style:name="P59" style:family="paragraph" style:parent-style-name="Text_20_body" style:list-style-name="L11">
      <style:paragraph-properties fo:margin-top="0in" fo:margin-bottom="0in"/>
    </style:style>
    <style:style style:name="P60" style:family="paragraph" style:parent-style-name="Text_20_body" style:list-style-name="L12">
      <style:paragraph-properties fo:margin-top="0in" fo:margin-bottom="0in"/>
    </style:style>
    <style:style style:name="P61" style:family="paragraph" style:parent-style-name="Text_20_body" style:list-style-name="L13">
      <style:paragraph-properties fo:margin-top="0in" fo:margin-bottom="0in"/>
    </style:style>
    <style:style style:name="P62" style:family="paragraph" style:parent-style-name="Text_20_body" style:list-style-name="L14">
      <style:paragraph-properties fo:margin-top="0in" fo:margin-bottom="0in"/>
    </style:style>
    <style:style style:name="P63" style:family="paragraph" style:parent-style-name="Text_20_body" style:list-style-name="L15">
      <style:paragraph-properties fo:margin-top="0in" fo:margin-bottom="0in"/>
    </style:style>
    <style:style style:name="P64" style:family="paragraph" style:parent-style-name="Text_20_body" style:list-style-name="L16">
      <style:paragraph-properties fo:margin-top="0in" fo:margin-bottom="0in"/>
    </style:style>
    <style:style style:name="P65" style:family="paragraph" style:parent-style-name="Text_20_body" style:list-style-name="L17">
      <style:paragraph-properties fo:margin-top="0in" fo:margin-bottom="0in"/>
    </style:style>
    <style:style style:name="P66" style:family="paragraph" style:parent-style-name="Text_20_body" style:list-style-name="L18">
      <style:paragraph-properties fo:margin-top="0in" fo:margin-bottom="0in"/>
    </style:style>
    <style:style style:name="P67" style:family="paragraph" style:parent-style-name="Text_20_body" style:list-style-name="L19">
      <style:paragraph-properties fo:margin-top="0in" fo:margin-bottom="0in"/>
    </style:style>
    <style:style style:name="P68" style:family="paragraph" style:parent-style-name="Text_20_body" style:list-style-name="L22">
      <style:paragraph-properties fo:margin-top="0in" fo:margin-bottom="0in"/>
    </style:style>
    <style:style style:name="P69" style:family="paragraph" style:parent-style-name="Text_20_body" style:list-style-name="L23">
      <style:paragraph-properties fo:margin-top="0in" fo:margin-bottom="0in"/>
    </style:style>
    <style:style style:name="P70" style:family="paragraph" style:parent-style-name="Text_20_body" style:list-style-name="L24">
      <style:paragraph-properties fo:margin-top="0in" fo:margin-bottom="0in"/>
    </style:style>
    <style:style style:name="P71" style:family="paragraph" style:parent-style-name="Text_20_body" style:list-style-name="L25">
      <style:paragraph-properties fo:margin-top="0in" fo:margin-bottom="0in"/>
    </style:style>
    <style:style style:name="P72" style:family="paragraph" style:parent-style-name="Text_20_body" style:list-style-name="L26">
      <style:paragraph-properties fo:margin-top="0in" fo:margin-bottom="0in"/>
    </style:style>
    <style:style style:name="P73" style:family="paragraph" style:parent-style-name="Text_20_body" style:list-style-name="L27">
      <style:paragraph-properties fo:margin-top="0in" fo:margin-bottom="0in"/>
    </style:style>
    <style:style style:name="P74" style:family="paragraph" style:parent-style-name="Text_20_body" style:list-style-name="L28">
      <style:paragraph-properties fo:margin-top="0in" fo:margin-bottom="0in"/>
    </style:style>
    <style:style style:name="P75" style:family="paragraph" style:parent-style-name="Text_20_body" style:list-style-name="L29">
      <style:paragraph-properties fo:margin-top="0in" fo:margin-bottom="0in"/>
    </style:style>
    <style:style style:name="P76" style:family="paragraph" style:parent-style-name="Text_20_body" style:list-style-name="L30">
      <style:paragraph-properties fo:margin-top="0in" fo:margin-bottom="0in"/>
    </style:style>
    <style:style style:name="P77" style:family="paragraph" style:parent-style-name="Text_20_body" style:list-style-name="L31">
      <style:paragraph-properties fo:margin-top="0in" fo:margin-bottom="0in"/>
    </style:style>
    <style:style style:name="P78" style:family="paragraph" style:parent-style-name="Text_20_body" style:list-style-name="L32">
      <style:paragraph-properties fo:margin-top="0in" fo:margin-bottom="0in"/>
    </style:style>
    <style:style style:name="P79" style:family="paragraph" style:parent-style-name="Text_20_body" style:list-style-name="L33">
      <style:paragraph-properties fo:margin-top="0in" fo:margin-bottom="0in"/>
    </style:style>
    <style:style style:name="P80" style:family="paragraph" style:parent-style-name="Text_20_body" style:list-style-name="L34">
      <style:paragraph-properties fo:margin-top="0in" fo:margin-bottom="0in"/>
    </style:style>
    <style:style style:name="P81" style:family="paragraph" style:parent-style-name="Text_20_body" style:list-style-name="L35">
      <style:paragraph-properties fo:margin-top="0in" fo:margin-bottom="0in"/>
    </style:style>
    <style:style style:name="P82" style:family="paragraph" style:parent-style-name="Text_20_body" style:list-style-name="L36">
      <style:paragraph-properties fo:margin-top="0in" fo:margin-bottom="0in"/>
    </style:style>
    <style:style style:name="P83" style:family="paragraph" style:parent-style-name="Text_20_body" style:list-style-name="L37">
      <style:paragraph-properties fo:margin-top="0in" fo:margin-bottom="0in"/>
    </style:style>
    <style:style style:name="P84" style:family="paragraph" style:parent-style-name="Text_20_body" style:list-style-name="L38">
      <style:paragraph-properties fo:margin-top="0in" fo:margin-bottom="0in"/>
    </style:style>
    <style:style style:name="P85" style:family="paragraph" style:parent-style-name="Text_20_body" style:list-style-name="L39">
      <style:paragraph-properties fo:margin-top="0in" fo:margin-bottom="0in"/>
    </style:style>
    <style:style style:name="P86" style:family="paragraph" style:parent-style-name="Text_20_body" style:list-style-name="L40">
      <style:paragraph-properties fo:margin-top="0in" fo:margin-bottom="0in"/>
    </style:style>
    <style:style style:name="P87" style:family="paragraph" style:parent-style-name="Text_20_body" style:list-style-name="L41">
      <style:paragraph-properties fo:margin-top="0in" fo:margin-bottom="0in"/>
    </style:style>
    <style:style style:name="P88" style:family="paragraph" style:parent-style-name="Text_20_body" style:list-style-name="L42">
      <style:paragraph-properties fo:margin-top="0in" fo:margin-bottom="0in"/>
    </style:style>
    <style:style style:name="P89" style:family="paragraph" style:parent-style-name="Text_20_body" style:list-style-name="L43">
      <style:paragraph-properties fo:margin-top="0in" fo:margin-bottom="0in"/>
    </style:style>
    <style:style style:name="P90" style:family="paragraph" style:parent-style-name="Preformatted_20_Text">
      <style:paragraph-properties fo:margin-top="0in" fo:margin-bottom="0.1965in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eature 1: Authentication Foundation — Login Flow </text:p>
      <text:p text:style-name="P30">I’ll frame this as the first implementable frontend task, covering login UI, auth flow, loading context, user context, and centralized error handling.</text:p>
      <text:p text:style-name="Text_20_body">Thought for a couple of seconds</text:p>
      <text:h text:style-name="Heading_20_2" text:outline-level="2">Task 1: Authentication Foundation — Login Flow</text:h>
      <text:h text:style-name="Heading_20_3" text:outline-level="3">Goal</text:h>
      <text:p text:style-name="Text_20_body">Implement the frontend login foundation, including authentication logic, loading handling, user state, and centralized error display.</text:p>
      <text:p text:style-name="Horizontal_20_Line"/>
      <text:h text:style-name="Heading_20_1" text:outline-level="1">Task 1: Login + Auth Foundation</text:h>
      <text:h text:style-name="Heading_20_2" text:outline-level="2">Scope</text:h>
      <text:p text:style-name="Text_20_body">Implement:</text:p>
      <text:list xml:id="list5528732261006429185" text:style-name="L29">
        <text:list-item>
          <text:p text:style-name="P75">Login page </text:p>
        </text:list-item>
        <text:list-item>
          <text:p text:style-name="P75">Login form validation </text:p>
        </text:list-item>
        <text:list-item>
          <text:p text:style-name="P75">Login API integration </text:p>
        </text:list-item>
        <text:list-item>
          <text:p text:style-name="P75">JWT storage </text:p>
        </text:list-item>
        <text:list-item>
          <text:p text:style-name="P75">UserContext </text:p>
        </text:list-item>
        <text:list-item>
          <text:p text:style-name="P75">LoadingContext </text:p>
        </text:list-item>
        <text:list-item>
          <text:p text:style-name="P75">Centralized error handling </text:p>
        </text:list-item>
        <text:list-item>
          <text:p text:style-name="P75">Toast/modal error display </text:p>
        </text:list-item>
        <text:list-item>
          <text:p text:style-name="P32">Authenticated route readiness </text:p>
        </text:list-item>
      </text:list>
      <text:p text:style-name="Horizontal_20_Line"/>
      <text:h text:style-name="Heading_20_2" text:outline-level="2">API Endpoint</text:h>
      <text:h text:style-name="Heading_20_3" text:outline-level="3">Login</text:h>
      <text:section text:style-name="Sect1" text:name="code-block-viewer">
        <text:p text:style-name="P90"><text:span text:style-name="Source_20_Text">POST /api/identity/login</text:span></text:p>
      </text:section>
      <text:p text:style-name="Text_20_body">Request:</text:p>
      <text:section text:style-name="Sect1" text:name="Section1">
        <text:p text:style-name="Preformatted_20_Text"><text:bookmark text:name="code-block-viewer"/><text:span text:style-name="Source_20_Text">{</text:span></text:p>
        <text:p text:style-name="Preformatted_20_Text"><text:span text:style-name="Source_20_Text"><text:s text:c="2"/>"usernameOrEmail": "alice",</text:span></text:p>
        <text:p text:style-name="Preformatted_20_Text"><text:span text:style-name="Source_20_Text"><text:s text:c="2"/>"password": "P@ssword123!"</text:span></text:p>
        <text:p text:style-name="P90"><text:span text:style-name="Source_20_Text">}</text:span></text:p>
      </text:section>
      <text:p text:style-name="Text_20_body">Response:</text:p>
      <text:section text:style-name="Sect1" text:name="Section2">
        <text:p text:style-name="Preformatted_20_Text"><text:bookmark text:name="code-block-viewer1"/><text:soft-page-break/><text:span text:style-name="Source_20_Text">{</text:span></text:p>
        <text:p text:style-name="Preformatted_20_Text"><text:span text:style-name="Source_20_Text"><text:s text:c="2"/>"accessToken": "eyJhbGciOi..."</text:span></text:p>
        <text:p text:style-name="P90"><text:span text:style-name="Source_20_Text">}</text:span></text:p>
      </text:section>
      <text:p text:style-name="Horizontal_20_Line"/>
      <text:h text:style-name="Heading_20_2" text:outline-level="2">Required Frontend Files / Areas</text:h>
      <text:section text:style-name="Sect1" text:name="Section3">
        <text:p text:style-name="Preformatted_20_Text"><text:bookmark text:name="code-block-viewer2"/><text:span text:style-name="Source_20_Text">src/</text:span></text:p>
        <text:p text:style-name="Preformatted_20_Text"><text:span text:style-name="Source_20_Text"><text:s/>├── api/</text:span></text:p>
        <text:p text:style-name="Preformatted_20_Text"><text:span text:style-name="Source_20_Text"><text:s/>│ <text:s text:c="3"/>└── identityApi.ts</text:span></text:p>
        <text:p text:style-name="Preformatted_20_Text"><text:span text:style-name="Source_20_Text"><text:s/>├── contexts/</text:span></text:p>
        <text:p text:style-name="Preformatted_20_Text"><text:span text:style-name="Source_20_Text"><text:s/>│ <text:s text:c="3"/>├── UserContext.tsx</text:span></text:p>
        <text:p text:style-name="Preformatted_20_Text"><text:span text:style-name="Source_20_Text"><text:s/>│ <text:s text:c="3"/>├── LoadingContext.tsx</text:span></text:p>
        <text:p text:style-name="Preformatted_20_Text"><text:span text:style-name="Source_20_Text"><text:s/>│ <text:s text:c="3"/>└── ErrorContext.tsx</text:span></text:p>
        <text:p text:style-name="Preformatted_20_Text"><text:span text:style-name="Source_20_Text"><text:s/>├── features/</text:span></text:p>
        <text:p text:style-name="Preformatted_20_Text"><text:span text:style-name="Source_20_Text"><text:s/>│ <text:s text:c="3"/>└── auth/</text:span></text:p>
        <text:p text:style-name="Preformatted_20_Text"><text:span text:style-name="Source_20_Text"><text:s/>│ <text:s text:c="8"/>├── LoginPage.tsx</text:span></text:p>
        <text:p text:style-name="Preformatted_20_Text"><text:span text:style-name="Source_20_Text"><text:s/>│ <text:s text:c="8"/>├── LoginForm.tsx</text:span></text:p>
        <text:p text:style-name="Preformatted_20_Text"><text:span text:style-name="Source_20_Text"><text:s/>│ <text:s text:c="8"/>└── useLogin.ts</text:span></text:p>
        <text:p text:style-name="Preformatted_20_Text"><text:span text:style-name="Source_20_Text"><text:s/>├── components/</text:span></text:p>
        <text:p text:style-name="Preformatted_20_Text"><text:span text:style-name="Source_20_Text"><text:s/>│ <text:s text:c="3"/>├── LoadingSpinner.tsx</text:span></text:p>
        <text:p text:style-name="Preformatted_20_Text"><text:span text:style-name="Source_20_Text"><text:s/>│ <text:s text:c="3"/>├── ToastProvider.tsx</text:span></text:p>
        <text:p text:style-name="Preformatted_20_Text"><text:span text:style-name="Source_20_Text"><text:s/>│ <text:s text:c="3"/>└── ErrorModal.tsx</text:span></text:p>
        <text:p text:style-name="Preformatted_20_Text"><text:span text:style-name="Source_20_Text"><text:s/>└── routes/</text:span></text:p>
        <text:p text:style-name="P90"><text:span text:style-name="Source_20_Text"><text:s text:c="6"/>└── ProtectedRoute.tsx</text:span></text:p>
      </text:section>
      <text:p text:style-name="Horizontal_20_Line"/>
      <text:h text:style-name="Heading_20_2" text:outline-level="2">Functional Requirements</text:h>
      <text:h text:style-name="Heading_20_3" text:outline-level="3">1. Login Page</text:h>
      <text:p text:style-name="Text_20_body">The login page must allow the user to enter:</text:p>
      <text:list xml:id="list3210402686752550389" text:style-name="L30">
        <text:list-item>
          <text:p text:style-name="P76">Username or email </text:p>
        </text:list-item>
        <text:list-item>
          <text:p text:style-name="P33">Password </text:p>
        </text:list-item>
      </text:list>
      <text:p text:style-name="Text_20_body">The page must include:</text:p>
      <text:list xml:id="list1962213365375562242" text:style-name="L31">
        <text:list-item>
          <text:p text:style-name="P77">Submit button </text:p>
        </text:list-item>
        <text:list-item>
          <text:p text:style-name="P77">Loading state </text:p>
        </text:list-item>
        <text:list-item>
          <text:p text:style-name="P77">Validation feedback </text:p>
        </text:list-item>
        <text:list-item>
          <text:p text:style-name="P34">Error feedback through toast or modal </text:p>
        </text:list-item>
      </text:list>
      <text:p text:style-name="Horizontal_20_Line"/>
      <text:h text:style-name="Heading_20_3" text:outline-level="3">2. Login Logic</text:h>
      <text:p text:style-name="Text_20_body">When the user submits the login form:</text:p>
      <text:list xml:id="list8825627822748661379" text:style-name="L32">
        <text:list-item>
          <text:p text:style-name="P78">Validate required fields. </text:p>
        </text:list-item>
        <text:list-item>
          <text:p text:style-name="P78">Show global loading spinner. </text:p>
        </text:list-item>
        <text:list-item>
          <text:p text:style-name="P35"><text:soft-page-break/>Call: </text:p>
        </text:list-item>
      </text:list>
      <text:section text:style-name="Sect1" text:name="Section4">
        <text:p text:style-name="P90"><text:bookmark text:name="code-block-viewer3"/><text:span text:style-name="Source_20_Text">POST /api/identity/login</text:span></text:p>
      </text:section>
      <text:list xml:id="list7420880150886821383" text:style-name="L33">
        <text:list-item>
          <text:p text:style-name="P79">Store returned JWT. </text:p>
        </text:list-item>
        <text:list-item>
          <text:p text:style-name="P79">Update <text:span text:style-name="Source_20_Text">UserContext</text:span>. </text:p>
        </text:list-item>
        <text:list-item>
          <text:p text:style-name="P79">Hide loading spinner. </text:p>
        </text:list-item>
        <text:list-item>
          <text:p text:style-name="P36">Redirect user to the next authenticated screen. </text:p>
        </text:list-item>
      </text:list>
      <text:p text:style-name="Text_20_body">Suggested redirect:</text:p>
      <text:section text:style-name="Sect1" text:name="Section5">
        <text:p text:style-name="P90"><text:bookmark text:name="code-block-viewer4"/><text:span text:style-name="Source_20_Text">/lobby</text:span></text:p>
      </text:section>
      <text:p text:style-name="Horizontal_20_Line"/>
      <text:h text:style-name="Heading_20_3" text:outline-level="3">3. LoadingContext</text:h>
      <text:p text:style-name="Text_20_body">Create a global <text:span text:style-name="Source_20_Text">LoadingContext</text:span>.</text:p>
      <text:p text:style-name="Text_20_body">Responsibilities:</text:p>
      <text:list xml:id="list1396964699856073025" text:style-name="L34">
        <text:list-item>
          <text:p text:style-name="P80">Track global loading state. </text:p>
        </text:list-item>
        <text:list-item>
          <text:p text:style-name="P80">Expose <text:span text:style-name="Source_20_Text">showLoading()</text:span>. </text:p>
        </text:list-item>
        <text:list-item>
          <text:p text:style-name="P80">Expose <text:span text:style-name="Source_20_Text">hideLoading()</text:span>. </text:p>
        </text:list-item>
        <text:list-item>
          <text:p text:style-name="P37">Expose <text:span text:style-name="Source_20_Text">isLoading</text:span>. </text:p>
        </text:list-item>
      </text:list>
      <text:p text:style-name="Text_20_body">Usage:</text:p>
      <text:section text:style-name="Sect1" text:name="Section6">
        <text:p text:style-name="P90"><text:bookmark text:name="code-block-viewer5"/><text:span text:style-name="Source_20_Text">const { showLoading, hideLoading, isLoading } = useLoading();</text:span></text:p>
      </text:section>
      <text:p text:style-name="Text_20_body">Rules:</text:p>
      <text:list xml:id="list414306877826315605" text:style-name="L35">
        <text:list-item>
          <text:p text:style-name="P81">Login submission must use the global loading context. </text:p>
        </text:list-item>
        <text:list-item>
          <text:p text:style-name="P81">A reusable <text:span text:style-name="Source_20_Text">LoadingSpinner</text:span> component must be shown while loading. </text:p>
        </text:list-item>
        <text:list-item>
          <text:p text:style-name="P38">Loading state must be cleared even if the request fails. </text:p>
        </text:list-item>
      </text:list>
      <text:p text:style-name="Horizontal_20_Line"/>
      <text:h text:style-name="Heading_20_3" text:outline-level="3">4. UserContext</text:h>
      <text:p text:style-name="Text_20_body">Create a global <text:span text:style-name="Source_20_Text">UserContext</text:span>.</text:p>
      <text:p text:style-name="Text_20_body">Responsibilities:</text:p>
      <text:list xml:id="list5774663059361542026" text:style-name="L36">
        <text:list-item>
          <text:p text:style-name="P82">Store current authenticated user state. </text:p>
        </text:list-item>
        <text:list-item>
          <text:p text:style-name="P82">Store access token. </text:p>
        </text:list-item>
        <text:list-item>
          <text:p text:style-name="P82">Expose <text:span text:style-name="Source_20_Text">login(token)</text:span>. </text:p>
        </text:list-item>
        <text:list-item>
          <text:p text:style-name="P82">Expose <text:span text:style-name="Source_20_Text">logout()</text:span>. </text:p>
        </text:list-item>
        <text:list-item>
          <text:p text:style-name="P39">Expose <text:span text:style-name="Source_20_Text">isAuthenticated</text:span>. </text:p>
        </text:list-item>
      </text:list>
      <text:p text:style-name="Text_20_body">Initial version may store only:</text:p>
      <text:section text:style-name="Sect1" text:name="Section7">
        <text:p text:style-name="Preformatted_20_Text"><text:bookmark text:name="code-block-viewer6"/><text:span text:style-name="Source_20_Text">type AuthUserState = {</text:span></text:p>
        <text:p text:style-name="Preformatted_20_Text"><text:span text:style-name="Source_20_Text"><text:s text:c="2"/>accessToken: string | null;</text:span></text:p>
        <text:p text:style-name="Preformatted_20_Text"><text:span text:style-name="Source_20_Text"><text:s text:c="2"/>isAuthenticated: boolean;</text:span></text:p>
        <text:p text:style-name="P90"><text:span text:style-name="Source_20_Text">};</text:span></text:p>
      </text:section>
      <text:p text:style-name="Text_20_body"><text:soft-page-break/>Rules:</text:p>
      <text:list xml:id="list5115757967015775916" text:style-name="L37">
        <text:list-item>
          <text:p text:style-name="P83">JWT must be persisted so refresh does not immediately lose login state. </text:p>
        </text:list-item>
        <text:list-item>
          <text:p text:style-name="P83">Prefer <text:span text:style-name="Source_20_Text">localStorage</text:span> for the first implementation. </text:p>
        </text:list-item>
        <text:list-item>
          <text:p text:style-name="P40">Later, this can be upgraded if refresh tokens or secure cookie auth are introduced. </text:p>
        </text:list-item>
      </text:list>
      <text:p text:style-name="Horizontal_20_Line"/>
      <text:h text:style-name="Heading_20_3" text:outline-level="3">5. Centralized Error Handling</text:h>
      <text:p text:style-name="Text_20_body">Create centralized error handling using <text:span text:style-name="Source_20_Text">ErrorContext</text:span>.</text:p>
      <text:p text:style-name="Text_20_body">Responsibilities:</text:p>
      <text:list xml:id="list3268120918568733981" text:style-name="L38">
        <text:list-item>
          <text:p text:style-name="P84">Normalize API errors. </text:p>
        </text:list-item>
        <text:list-item>
          <text:p text:style-name="P84">Expose <text:span text:style-name="Source_20_Text">showError(error)</text:span>. </text:p>
        </text:list-item>
        <text:list-item>
          <text:p text:style-name="P84">Support toast display. </text:p>
        </text:list-item>
        <text:list-item>
          <text:p text:style-name="P41">Support modal display for blocking errors. </text:p>
        </text:list-item>
      </text:list>
      <text:p text:style-name="Text_20_body">Example error shape:</text:p>
      <text:section text:style-name="Sect1" text:name="Section8">
        <text:p text:style-name="Preformatted_20_Text"><text:bookmark text:name="code-block-viewer7"/><text:span text:style-name="Source_20_Text">type AppError = {</text:span></text:p>
        <text:p text:style-name="Preformatted_20_Text"><text:span text:style-name="Source_20_Text"><text:s text:c="2"/>title: string;</text:span></text:p>
        <text:p text:style-name="Preformatted_20_Text"><text:span text:style-name="Source_20_Text"><text:s text:c="2"/>message: string;</text:span></text:p>
        <text:p text:style-name="Preformatted_20_Text"><text:span text:style-name="Source_20_Text"><text:s text:c="2"/>type: "toast" | "modal";</text:span></text:p>
        <text:p text:style-name="P90"><text:span text:style-name="Source_20_Text">};</text:span></text:p>
      </text:section>
      <text:p text:style-name="Text_20_body">Rules:</text:p>
      <text:list xml:id="list6768221764820909735" text:style-name="L39">
        <text:list-item>
          <text:p text:style-name="P85">Login failures must not be handled only inside the form. </text:p>
        </text:list-item>
        <text:list-item>
          <text:p text:style-name="P85">API errors must go through centralized error handling. </text:p>
        </text:list-item>
        <text:list-item>
          <text:p text:style-name="P42">User-facing errors must be clear and non-technical. </text:p>
        </text:list-item>
      </text:list>
      <text:p text:style-name="Text_20_body">Example login error:</text:p>
      <text:section text:style-name="Sect1" text:name="Section9">
        <text:p text:style-name="P90"><text:bookmark text:name="code-block-viewer8"/><text:span text:style-name="Source_20_Text">Invalid username/email or password.</text:span></text:p>
      </text:section>
      <text:p text:style-name="Horizontal_20_Line"/>
      <text:h text:style-name="Heading_20_2" text:outline-level="2">UI Requirements</text:h>
      <text:h text:style-name="Heading_20_3" text:outline-level="3">Loading Spinner</text:h>
      <text:p text:style-name="Text_20_body">Display a global loading spinner when:</text:p>
      <text:list xml:id="list8190114521702571284" text:style-name="L40">
        <text:list-item>
          <text:p text:style-name="P86">Login request is in progress. </text:p>
        </text:list-item>
        <text:list-item>
          <text:p text:style-name="P43">Future register/logout/auth requests are in progress. </text:p>
        </text:list-item>
      </text:list>
      <text:p text:style-name="Text_20_body">The spinner must not permanently block the UI if an error occurs.</text:p>
      <text:p text:style-name="Horizontal_20_Line"/>
      <text:h text:style-name="Heading_20_3" text:outline-level="3"><text:soft-page-break/>Error Display</text:h>
      <text:p text:style-name="Text_20_body">Errors should appear as:</text:p>
      <text:list xml:id="list8994242450006979856" text:style-name="L41">
        <text:list-item>
          <text:p text:style-name="P87">Toast for common login/API failures. </text:p>
        </text:list-item>
        <text:list-item>
          <text:p text:style-name="P44">Modal for severe or blocking failures. </text:p>
        </text:list-item>
      </text:list>
      <text:p text:style-name="Text_20_body">Login failure should use a toast by default.</text:p>
      <text:p text:style-name="Horizontal_20_Line"/>
      <text:h text:style-name="Heading_20_2" text:outline-level="2">API Client Requirement</text:h>
      <text:p text:style-name="Text_20_body">Create a typed identity API wrapper.</text:p>
      <text:p text:style-name="Text_20_body">Example:</text:p>
      <text:section text:style-name="Sect1" text:name="Section10">
        <text:p text:style-name="Preformatted_20_Text"><text:bookmark text:name="code-block-viewer9"/><text:span text:style-name="Source_20_Text">export type LoginRequest = {</text:span></text:p>
        <text:p text:style-name="Preformatted_20_Text"><text:span text:style-name="Source_20_Text"><text:s text:c="2"/>usernameOrEmail: string;</text:span></text:p>
        <text:p text:style-name="Preformatted_20_Text"><text:span text:style-name="Source_20_Text"><text:s text:c="2"/>password: string;</text:span></text:p>
        <text:p text:style-name="Preformatted_20_Text"><text:span text:style-name="Source_20_Text">};</text:span></text:p>
        <text:p text:style-name="Preformatted_20_Text"><text:span text:style-name="Source_20_Text">export type LoginResponse = {</text:span></text:p>
        <text:p text:style-name="Preformatted_20_Text"><text:span text:style-name="Source_20_Text"><text:s text:c="2"/>accessToken: string;</text:span></text:p>
        <text:p text:style-name="Preformatted_20_Text"><text:span text:style-name="Source_20_Text">};</text:span></text:p>
        <text:p text:style-name="Preformatted_20_Text"><text:span text:style-name="Source_20_Text">export async function login(request: LoginRequest): Promise&lt;LoginResponse&gt; {</text:span></text:p>
        <text:p text:style-name="Preformatted_20_Text"><text:span text:style-name="Source_20_Text"><text:s text:c="2"/>const response = await fetch("/api/identity/login", {</text:span></text:p>
        <text:p text:style-name="Preformatted_20_Text"><text:span text:style-name="Source_20_Text"><text:s text:c="4"/>method: "POST",</text:span></text:p>
        <text:p text:style-name="Preformatted_20_Text"><text:span text:style-name="Source_20_Text"><text:s text:c="4"/>headers: {</text:span></text:p>
        <text:p text:style-name="Preformatted_20_Text"><text:span text:style-name="Source_20_Text"><text:s text:c="6"/>"Content-Type": "application/json"</text:span></text:p>
        <text:p text:style-name="Preformatted_20_Text"><text:span text:style-name="Source_20_Text"><text:s text:c="4"/>},</text:span></text:p>
        <text:p text:style-name="Preformatted_20_Text"><text:span text:style-name="Source_20_Text"><text:s text:c="4"/>body: JSON.stringify(request)</text:span></text:p>
        <text:p text:style-name="Preformatted_20_Text"><text:span text:style-name="Source_20_Text"><text:s text:c="2"/>});</text:span></text:p>
        <text:p text:style-name="Preformatted_20_Text"><text:span text:style-name="Source_20_Text"><text:s text:c="2"/>if (!response.ok) {</text:span></text:p>
        <text:p text:style-name="Preformatted_20_Text"><text:span text:style-name="Source_20_Text"><text:s text:c="4"/>throw new Error("Login failed"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return response.json();</text:span></text:p>
        <text:p text:style-name="P90"><text:span text:style-name="Source_20_Text">}</text:span></text:p>
      </text:section>
      <text:p text:style-name="Horizontal_20_Line"/>
      <text:h text:style-name="Heading_20_2" text:outline-level="2">Acceptance Criteria</text:h>
      <text:list xml:id="list1701648945290263295" text:style-name="L42">
        <text:list-item>
          <text:p text:style-name="P88">User can enter username/email and password. </text:p>
        </text:list-item>
        <text:list-item>
          <text:p text:style-name="P88">Submit calls <text:span text:style-name="Source_20_Text">POST /api/identity/login</text:span>. </text:p>
        </text:list-item>
        <text:list-item>
          <text:p text:style-name="P88">Loading spinner appears during login request. </text:p>
        </text:list-item>
        <text:list-item>
          <text:p text:style-name="P88">Loading spinner disappears after success or failure. </text:p>
        </text:list-item>
        <text:list-item>
          <text:p text:style-name="P88">JWT is stored after successful login. </text:p>
        </text:list-item>
        <text:list-item>
          <text:p text:style-name="P88"><text:span text:style-name="Source_20_Text">UserContext</text:span> reflects authenticated state. </text:p>
        </text:list-item>
        <text:list-item>
          <text:p text:style-name="P88">Failed login displays a toast error. </text:p>
        </text:list-item>
        <text:list-item>
          <text:p text:style-name="P88">Login page does not directly manage global error display. </text:p>
        </text:list-item>
        <text:list-item>
          <text:p text:style-name="P88">Login page does not directly manage global loading implementation. </text:p>
        </text:list-item>
        <text:list-item>
          <text:p text:style-name="P88">User is redirected after successful login. </text:p>
        </text:list-item>
        <text:list-item>
          <text:p text:style-name="P45">Code is prepared for future register flow. </text:p>
        </text:list-item>
      </text:list>
      <text:p text:style-name="Horizontal_20_Line"><text:soft-page-break/></text:p>
      <text:h text:style-name="Heading_20_2" text:outline-level="2">Out of Scope</text:h>
      <text:p text:style-name="Text_20_body">Not included in this task:</text:p>
      <text:list xml:id="list2465252284877795095" text:style-name="L43">
        <text:list-item>
          <text:p text:style-name="P89">Registration UI </text:p>
        </text:list-item>
        <text:list-item>
          <text:p text:style-name="P89">Refresh token flow </text:p>
        </text:list-item>
        <text:list-item>
          <text:p text:style-name="P89">Forgot password </text:p>
        </text:list-item>
        <text:list-item>
          <text:p text:style-name="P89">Email verification </text:p>
        </text:list-item>
        <text:list-item>
          <text:p text:style-name="P89">Role-based authorization </text:p>
        </text:list-item>
        <text:list-item>
          <text:p text:style-name="P89">Profile API </text:p>
        </text:list-item>
        <text:list-item>
          <text:p text:style-name="P46">Multiplayer lobby integration beyond redirect target</text:p>
        </text:list-item>
      </text:list>
      <text:p text:style-name="P30"/>
      <text:h text:style-name="P1" text:outline-level="2">CORS and API Environment Requirements</text:h>
      <text:p text:style-name="Text_20_body">Create frontend environment configuration for the backend API base URL.</text:p>
      <text:p text:style-name="Text_20_body">Required file:</text:p>
      <text:p text:style-name="P90"><text:span text:style-name="Source_20_Text">.env.example</text:span></text:p>
      <text:p text:style-name="Text_20_body">Required value:</text:p>
      <text:p text:style-name="P90"><text:span text:style-name="Source_20_Text">VITE_API_BASE_URL=https://localhost:5001</text:span></text:p>
      <text:p text:style-name="Text_20_body">Create a centralized API configuration module:</text:p>
      <text:p text:style-name="P90"><text:span text:style-name="Source_20_Text">src/api/apiConfig.ts</text:span></text:p>
      <text:p text:style-name="Text_20_body">Responsibilities:</text:p>
      <text:list xml:id="list8274831724102898914" text:style-name="L44">
        <text:list-item>
          <text:p text:style-name="P47">Read <text:span text:style-name="Source_20_Text">import.meta.env.VITE_API_BASE_URL</text:span>.</text:p>
        </text:list-item>
        <text:list-item>
          <text:p text:style-name="P47">Validate that the value exists.</text:p>
        </text:list-item>
        <text:list-item>
          <text:p text:style-name="P47">Remove trailing slashes.</text:p>
        </text:list-item>
        <text:list-item>
          <text:p text:style-name="P47">Export the normalized API base URL.</text:p>
        </text:list-item>
      </text:list>
      <text:p text:style-name="Text_20_body">Example:</text:p>
      <text:p text:style-name="Preformatted_20_Text"><text:span text:style-name="Source_20_Text">const rawApiBaseUrl = import.meta.env.VITE_API_BASE_URL;</text:span></text:p>
      <text:p text:style-name="Preformatted_20_Text"/>
      <text:p text:style-name="Preformatted_20_Text"><text:span text:style-name="Source_20_Text">if (!rawApiBaseUrl) {</text:span></text:p>
      <text:p text:style-name="Preformatted_20_Text"><text:span text:style-name="Source_20_Text"><text:s text:c="2"/>throw new Error("Missing VITE_API_BASE_URL environment variable.");</text:span></text:p>
      <text:p text:style-name="Preformatted_20_Text"><text:span text:style-name="Source_20_Text">}</text:span></text:p>
      <text:p text:style-name="Preformatted_20_Text"/>
      <text:p text:style-name="P90"><text:span text:style-name="Source_20_Text">export const apiBaseUrl = rawApiBaseUrl.replace(/\/$/, "");</text:span></text:p>
      <text:p text:style-name="Text_20_body">Update identity API calls so login uses the configured backend base URL:</text:p>
      <text:p text:style-name="Preformatted_20_Text"><text:span text:style-name="Source_20_Text">const response = await fetch(`${apiBaseUrl}/api/identity/login`, {</text:span></text:p>
      <text:p text:style-name="Preformatted_20_Text"><text:span text:style-name="Source_20_Text"><text:s text:c="2"/>method: "POST",</text:span></text:p>
      <text:p text:style-name="Preformatted_20_Text"><text:span text:style-name="Source_20_Text"><text:s text:c="2"/>headers: {</text:span></text:p>
      <text:p text:style-name="Preformatted_20_Text"><text:soft-page-break/><text:span text:style-name="Source_20_Text"><text:s text:c="4"/>"Content-Type": "application/json",</text:span></text:p>
      <text:p text:style-name="Preformatted_20_Text"><text:span text:style-name="Source_20_Text"><text:s text:c="4"/>"Accept": "application/json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credentials: "omit",</text:span></text:p>
      <text:p text:style-name="Preformatted_20_Text"><text:span text:style-name="Source_20_Text"><text:s text:c="2"/>body: JSON.stringify(request)</text:span></text:p>
      <text:p text:style-name="P90"><text:span text:style-name="Source_20_Text">});</text:span></text:p>
      <text:p text:style-name="Text_20_body">Authenticated API requests must add:</text:p>
      <text:p text:style-name="P90"><text:span text:style-name="Source_20_Text">Authorization: `Bearer ${accessToken}`</text:span></text:p>
      <text:p text:style-name="Text_20_body">SignalR services must derive hub URLs from the same base URL:</text:p>
      <text:p text:style-name="Preformatted_20_Text"><text:span text:style-name="Source_20_Text">`${apiBaseUrl}/hubs/lobbies`</text:span></text:p>
      <text:p text:style-name="P90"><text:span text:style-name="Source_20_Text">`${apiBaseUrl}/hubs/game`</text:span></text:p>
      <text:p text:style-name="Text_20_body">SignalR authentication must use:</text:p>
      <text:p text:style-name="P90"><text:span text:style-name="Source_20_Text">accessTokenFactory: () =&gt; accessToken</text:span></text:p>
      <text:p text:style-name="Text_20_body">Acceptance criteria additions:</text:p>
      <text:list xml:id="list3215949051647303848" text:style-name="L45">
        <text:list-item>
          <text:p text:style-name="P48"><text:span text:style-name="Source_20_Text">.env.example</text:span> contains <text:span text:style-name="Source_20_Text">VITE_API_BASE_URL</text:span>.</text:p>
        </text:list-item>
        <text:list-item>
          <text:p text:style-name="P48">Login does not call relative <text:span text:style-name="Source_20_Text">/api/...</text:span> paths directly.</text:p>
        </text:list-item>
        <text:list-item>
          <text:p text:style-name="P48">Login request uses <text:span text:style-name="Source_20_Text">credentials: "omit"</text:span>.</text:p>
        </text:list-item>
        <text:list-item>
          <text:p text:style-name="P48">Login request sends <text:span text:style-name="Source_20_Text">Accept: application/json</text:span>.</text:p>
        </text:list-item>
        <text:list-item>
          <text:p text:style-name="P48">API base URL is centralized.</text:p>
        </text:list-item>
        <text:list-item>
          <text:p text:style-name="P48">No component hardcodes backend URLs.</text:p>
        </text:list-item>
        <text:list-item>
          <text:p text:style-name="P48">Future SignalR services derive hub URLs from the same API base URL.</text:p>
        </text:list-item>
        <text:list-item>
          <text:p text:style-name="P48">CORS failures are mapped to a clear frontend error message.</text:p>
        </text:list-item>
      </text:list>
      <text:p text:style-name="Text_20_body">Suggested CORS/network error message:</text:p>
      <text:p text:style-name="P90"><text:span text:style-name="Source_20_Text">Unable to reach the backend API. Check that the frontend origin is allowed by the backend CORS configuration and that VITE_API_BASE_URL is correct.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ija Pavkovic</meta:initial-creator>
    <meta:creation-date>2026-04-17T12:22:23.66</meta:creation-date>
    <dc:date>2026-06-07T19:19:22.06</dc:date>
    <dc:creator>Matija Pavkovic</dc:creator>
    <meta:editing-duration>PT3H6M11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7" meta:paragraph-count="222" meta:word-count="933" meta:character-count="6589"/>
  </office:meta>
</office:document-meta>
</file>